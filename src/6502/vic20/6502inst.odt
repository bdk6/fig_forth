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9pt" officeooo:rsid="00100b73" officeooo:paragraph-rsid="00100b73" style:font-size-asian="9pt" style:font-size-complex="9pt"/>
    </style:style>
    <style:style style:name="P2" style:family="paragraph" style:parent-style-name="Standard">
      <style:text-properties style:font-name="Liberation Mono" fo:font-size="9pt" officeooo:rsid="00100b73" officeooo:paragraph-rsid="0010121b" style:font-size-asian="9pt" style:font-size-complex="9pt"/>
    </style:style>
    <style:style style:name="P3" style:family="paragraph" style:parent-style-name="Standard">
      <style:text-properties style:font-name="Liberation Mono" fo:font-size="9pt" officeooo:rsid="00100b73" officeooo:paragraph-rsid="00116b5d" style:font-size-asian="9pt" style:font-size-complex="9pt"/>
    </style:style>
    <style:style style:name="P4" style:family="paragraph" style:parent-style-name="Standard">
      <style:text-properties style:font-name="Liberation Mono" fo:font-size="9pt" officeooo:rsid="00100b73" officeooo:paragraph-rsid="00139a5a" style:font-size-asian="9pt" style:font-size-complex="9pt"/>
    </style:style>
    <style:style style:name="P5" style:family="paragraph" style:parent-style-name="Standard">
      <style:text-properties style:font-name="Liberation Mono" fo:font-size="9pt" officeooo:rsid="00100b73" officeooo:paragraph-rsid="0017a4b3" style:font-size-asian="9pt" style:font-size-complex="9pt"/>
    </style:style>
    <style:style style:name="P6" style:family="paragraph" style:parent-style-name="Standard">
      <style:text-properties style:font-name="Liberation Mono" fo:font-size="9pt" officeooo:rsid="00100b73" officeooo:paragraph-rsid="00195247" style:font-size-asian="9pt" style:font-size-complex="9pt"/>
    </style:style>
    <style:style style:name="P7" style:family="paragraph" style:parent-style-name="Standard">
      <style:text-properties style:font-name="Liberation Mono" fo:font-size="9pt" officeooo:rsid="00100b73" officeooo:paragraph-rsid="001b4bbf" style:font-size-asian="9pt" style:font-size-complex="9pt"/>
    </style:style>
    <style:style style:name="P8" style:family="paragraph" style:parent-style-name="Standard">
      <style:text-properties style:font-name="Liberation Mono" fo:font-size="9pt" officeooo:rsid="00100b73" officeooo:paragraph-rsid="001d8c99" style:font-size-asian="9pt" style:font-size-complex="9pt"/>
    </style:style>
    <style:style style:name="P9" style:family="paragraph" style:parent-style-name="Standard">
      <style:text-properties style:font-name="Liberation Mono" fo:font-size="9pt" officeooo:rsid="00100b73" officeooo:paragraph-rsid="001e878a" style:font-size-asian="9pt" style:font-size-complex="9pt"/>
    </style:style>
    <style:style style:name="P10" style:family="paragraph" style:parent-style-name="Standard">
      <style:text-properties style:font-name="Liberation Mono" fo:font-size="9pt" officeooo:rsid="0010121b" officeooo:paragraph-rsid="0010121b" style:font-size-asian="9pt" style:font-size-complex="9pt"/>
    </style:style>
    <style:style style:name="P11" style:family="paragraph" style:parent-style-name="Standard">
      <style:text-properties style:font-name="Liberation Mono" fo:font-size="9pt" officeooo:rsid="0010121b" officeooo:paragraph-rsid="0017a4b3" style:font-size-asian="9pt" style:font-size-complex="9pt"/>
    </style:style>
    <style:style style:name="P12" style:family="paragraph" style:parent-style-name="Standard">
      <style:text-properties style:font-name="Liberation Mono" fo:font-size="9pt" officeooo:rsid="00116b5d" officeooo:paragraph-rsid="00116b5d" style:font-size-asian="9pt" style:font-size-complex="9pt"/>
    </style:style>
    <style:style style:name="P13" style:family="paragraph" style:parent-style-name="Standard">
      <style:text-properties style:font-name="Liberation Mono" fo:font-size="9pt" officeooo:rsid="00116b5d" officeooo:paragraph-rsid="0017a4b3" style:font-size-asian="9pt" style:font-size-complex="9pt"/>
    </style:style>
    <style:style style:name="P14" style:family="paragraph" style:parent-style-name="Standard">
      <style:text-properties style:font-name="Liberation Mono" fo:font-size="9pt" officeooo:rsid="0011b173" officeooo:paragraph-rsid="0011b173" style:font-size-asian="9pt" style:font-size-complex="9pt"/>
    </style:style>
    <style:style style:name="P15" style:family="paragraph" style:parent-style-name="Standard">
      <style:text-properties style:font-name="Liberation Mono" fo:font-size="9pt" officeooo:rsid="0011b173" officeooo:paragraph-rsid="0017a4b3" style:font-size-asian="9pt" style:font-size-complex="9pt"/>
    </style:style>
    <style:style style:name="P16" style:family="paragraph" style:parent-style-name="Standard">
      <style:text-properties style:font-name="Liberation Mono" fo:font-size="9pt" officeooo:rsid="00139a5a" officeooo:paragraph-rsid="00139a5a" style:font-size-asian="9pt" style:font-size-complex="9pt"/>
    </style:style>
    <style:style style:name="P17" style:family="paragraph" style:parent-style-name="Standard">
      <style:text-properties style:font-name="Liberation Mono" fo:font-size="9pt" officeooo:rsid="00139a5a" officeooo:paragraph-rsid="0017a4b3" style:font-size-asian="9pt" style:font-size-complex="9pt"/>
    </style:style>
    <style:style style:name="P18" style:family="paragraph" style:parent-style-name="Standard">
      <style:text-properties style:font-name="Liberation Mono" fo:font-size="9pt" officeooo:rsid="001557bc" officeooo:paragraph-rsid="001557bc" style:font-size-asian="9pt" style:font-size-complex="9pt"/>
    </style:style>
    <style:style style:name="P19" style:family="paragraph" style:parent-style-name="Standard">
      <style:text-properties style:font-name="Liberation Mono" fo:font-size="9pt" officeooo:rsid="001557bc" officeooo:paragraph-rsid="0017a4b3" style:font-size-asian="9pt" style:font-size-complex="9pt"/>
    </style:style>
    <style:style style:name="P20" style:family="paragraph" style:parent-style-name="Standard">
      <style:text-properties style:font-name="Liberation Mono" fo:font-size="9pt" officeooo:rsid="0015e054" officeooo:paragraph-rsid="0015e054" style:font-size-asian="9pt" style:font-size-complex="9pt"/>
    </style:style>
    <style:style style:name="P21" style:family="paragraph" style:parent-style-name="Standard">
      <style:text-properties style:font-name="Liberation Mono" fo:font-size="9pt" officeooo:rsid="0015e054" officeooo:paragraph-rsid="0017a4b3" style:font-size-asian="9pt" style:font-size-complex="9pt"/>
    </style:style>
    <style:style style:name="P22" style:family="paragraph" style:parent-style-name="Standard">
      <style:text-properties fo:font-size="9pt" style:font-size-asian="9pt" style:font-size-complex="9pt"/>
    </style:style>
    <style:style style:name="P23" style:family="paragraph" style:parent-style-name="Standard">
      <style:text-properties fo:font-size="9pt" officeooo:paragraph-rsid="0017a4b3" style:font-size-asian="9pt" style:font-size-complex="9pt"/>
    </style:style>
    <style:style style:name="T1" style:family="text">
      <style:text-properties officeooo:rsid="0010121b"/>
    </style:style>
    <style:style style:name="T2" style:family="text">
      <style:text-properties officeooo:rsid="00139a5a"/>
    </style:style>
    <style:style style:name="T3" style:family="text">
      <style:text-properties officeooo:rsid="001557bc"/>
    </style:style>
    <style:style style:name="T4" style:family="text">
      <style:text-properties officeooo:rsid="0015e054"/>
    </style:style>
    <style:style style:name="T5" style:family="text">
      <style:text-properties officeooo:rsid="0017a4b3"/>
    </style:style>
    <style:style style:name="T6" style:family="text">
      <style:text-properties officeooo:rsid="00195247"/>
    </style:style>
    <style:style style:name="T7" style:family="text">
      <style:text-properties officeooo:rsid="0019e32e"/>
    </style:style>
    <style:style style:name="T8" style:family="text">
      <style:text-properties officeooo:rsid="001aa009"/>
    </style:style>
    <style:style style:name="T9" style:family="text">
      <style:text-properties officeooo:rsid="001ab2f3"/>
    </style:style>
    <style:style style:name="T10" style:family="text">
      <style:text-properties officeooo:rsid="001b4bbf"/>
    </style:style>
    <style:style style:name="T11" style:family="text">
      <style:text-properties officeooo:rsid="001c32ba"/>
    </style:style>
    <style:style style:name="T12" style:family="text">
      <style:text-properties officeooo:rsid="001d8c99"/>
    </style:style>
    <style:style style:name="T13" style:family="text">
      <style:text-properties officeooo:rsid="001e878a"/>
    </style:style>
    <style:style style:name="T14" style:family="text">
      <style:text-properties officeooo:rsid="0020145b"/>
    </style:style>
    <style:style style:name="T15" style:family="text">
      <style:text-properties officeooo:rsid="002145fa"/>
    </style:style>
    <style:style style:name="T16" style:family="text">
      <style:text-properties officeooo:rsid="002203d2"/>
    </style:style>
    <style:style style:name="T17" style:family="text">
      <style:text-properties officeooo:rsid="0023e242"/>
    </style:style>
    <style:style style:name="T18" style:family="text">
      <style:text-properties officeooo:rsid="002483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">INST <text:span text:style-name="T3">|</text:span>IMP<text:span text:style-name="T3">|</text:span>ACC<text:span text:style-name="T3">|</text:span>ABS<text:span text:style-name="T3">|</text:span>0PG<text:span text:style-name="T3">|</text:span>IMM<text:span text:style-name="T3">|</text:span>AB,X<text:span text:style-name="T3">|</text:span>AB,Y<text:span text:style-name="T3">|</text:span>(I,X) (I),Y OPG,X 0PG,Y REL IND |NVBDIZC</text:p>
      <text:p text:style-name="P1">ADC <text:s text:c="11"/>6D <text:s/>65 <text:s/>69 <text:s/>7D <text:s text:c="2"/>79 <text:s text:c="3"/>61 <text:s text:c="2"/>71 <text:s text:c="3"/>75 <text:s text:c="16"/>|XX <text:s text:c="2"/>XX</text:p>
      <text:p text:style-name="P1">AND <text:s text:c="11"/>2D <text:s/>25 <text:s/>29 <text:s/>3D <text:s text:c="2"/>39 <text:s text:c="3"/>21 <text:s text:c="2"/>31 <text:s text:c="3"/>35 <text:s text:c="16"/>|X <text:s text:c="3"/>X </text:p>
      <text:p text:style-name="P1">ASL <text:s text:c="7"/>0A <text:s/>0E <text:s/>06 <text:s text:c="5"/>1E <text:s text:c="19"/>16 <text:s text:c="16"/>|X <text:s text:c="3"/>XX</text:p>
      <text:p text:style-name="P2"><text:span text:style-name="T1">BCC <text:s text:c="57"/>90 <text:s text:c="4"/>|</text:span></text:p>
      <text:p text:style-name="P2"><text:span text:style-name="T1">BCS <text:s text:c="57"/>B0 <text:s text:c="4"/>|</text:span></text:p>
      <text:p text:style-name="P2"><text:span text:style-name="T1">BEQ <text:s text:c="57"/>F0 <text:s text:c="4"/>|</text:span></text:p>
      <text:p text:style-name="P2"><text:span text:style-name="T1">BIT <text:s text:c="11"/>2C <text:s/>24 <text:s text:c="46"/>|76 <text:s text:c="2"/>X </text:span></text:p>
      <text:p text:style-name="P2"><text:span text:style-name="T1">BMI <text:s text:c="57"/>30 <text:s text:c="4"/>|</text:span></text:p>
      <text:p text:style-name="P2"><text:span text:style-name="T1">BNE <text:s text:c="57"/>D0 <text:s text:c="4"/>| <text:s text:c="6"/></text:span></text:p>
      <text:p text:style-name="P2"><text:span text:style-name="T1">BPL <text:s text:c="57"/>10</text:span> <text:s text:c="4"/><text:span text:style-name="T1">|</text:span></text:p>
      <text:p text:style-name="P2">INST <text:s/>IMP ACC ABS 0PG IMM AB,X AB,Y (I,X) (I),Y OPG,X 0PG,Y REL IND |NVBDIZC</text:p>
      <text:p text:style-name="P2"><text:span text:style-name="T1">BRK <text:s text:c="3"/>00 <text:s text:c="58"/>| <text:s/>1 <text:s text:c="3"/></text:span></text:p>
      <text:p text:style-name="P2"><text:span text:style-name="T1">BVC <text:s text:c="57"/>50 <text:s text:c="4"/>| <text:s text:c="6"/></text:span></text:p>
      <text:p text:style-name="P2"><text:span text:style-name="T1">BVS <text:s text:c="57"/>70</text:span> <text:s text:c="4"/><text:span text:style-name="T1">| <text:s text:c="6"/></text:span></text:p>
      <text:p text:style-name="P10">CLC <text:s text:c="3"/>18 <text:s text:c="58"/>| <text:s text:c="5"/>0</text:p>
      <text:p text:style-name="P10">CLD <text:s text:c="3"/>D8 <text:s text:c="58"/>| <text:s text:c="2"/>0 <text:s text:c="2"/></text:p>
      <text:p text:style-name="P10">CLI <text:s text:c="3"/>58 <text:s text:c="58"/>| <text:s text:c="3"/>0 <text:s/></text:p>
      <text:p text:style-name="P10">CLV <text:s text:c="3"/>B8 <text:s text:c="58"/>| 0 <text:s text:c="4"/></text:p>
      <text:p text:style-name="P10">CMP <text:s text:c="11"/>CD <text:s/>C5 <text:s/>C9 <text:s/>DD <text:s text:c="2"/>D9 <text:s text:c="3"/>C1 <text:s text:c="3"/>D1 <text:s text:c="2"/>D5 <text:s text:c="16"/>|X <text:s text:c="3"/>XX</text:p>
      <text:p text:style-name="P12">CPX <text:s text:c="11"/>EC <text:s/>E4 <text:s/>E0 <text:s text:c="42"/>|X <text:s text:c="3"/>XX</text:p>
      <text:p text:style-name="P12">CPY <text:s text:c="11"/>CC <text:s/>C4 <text:s/>C0 <text:s text:c="42"/>|X <text:s text:c="3"/>XX</text:p>
      <text:p text:style-name="P3">INST <text:s/>IMP ACC ABS 0PG IMM AB,X AB,Y (I,X) (I),Y OPG,X 0PG,Y REL IND |NVBDIZC</text:p>
      <text:p text:style-name="P14">DEC <text:s text:c="11"/>CE <text:s/><text:span text:style-name="T2">C6 <text:s text:c="5"/>DE <text:s text:c="19"/>D6 <text:s text:c="16"/>|X <text:s text:c="3"/>X </text:span></text:p>
      <text:p text:style-name="P16">DEX <text:s text:c="3"/>CA <text:s text:c="58"/>|X <text:s text:c="3"/>X </text:p>
      <text:p text:style-name="P16">DEY <text:s text:c="3"/>88 <text:s text:c="58"/>|X <text:s text:c="3"/>X </text:p>
      <text:p text:style-name="P16">EOR <text:s text:c="11"/>4D <text:s/>45 <text:s/>49 <text:s/>5D <text:s text:c="2"/>59 <text:s text:c="2"/>41 <text:s text:c="3"/>51 <text:s text:c="3"/>55 <text:s text:c="16"/>|X <text:s text:c="3"/>X </text:p>
      <text:p text:style-name="P16">INC <text:s text:c="11"/>EE <text:s/>E6 <text:s text:c="5"/>FE <text:s text:c="19"/>F6 <text:s text:c="16"/>|X <text:s text:c="3"/>X </text:p>
      <text:p text:style-name="P16">INX <text:s text:c="3"/>E8 <text:s text:c="58"/>|X <text:s text:c="3"/>X </text:p>
      <text:p text:style-name="P16">INY <text:s text:c="3"/>C8 <text:s text:c="58"/>|X <text:s text:c="3"/>X </text:p>
      <text:p text:style-name="P16">JMP <text:s text:c="11"/>4C <text:s text:c="47"/>6C | <text:s text:c="6"/></text:p>
      <text:p text:style-name="P16">JSR <text:s text:c="11"/>20 <text:s text:c="50"/>| <text:s text:c="6"/></text:p>
      <text:p text:style-name="P16">LDA <text:s text:c="11"/>AD <text:s/>A5 <text:s/>A9 <text:s/>BD <text:s text:c="2"/>B9 <text:s text:c="2"/>A1 <text:s text:c="3"/>B1 <text:s text:c="3"/>B5 <text:s text:c="16"/>|X <text:s text:c="3"/>X </text:p>
      <text:p text:style-name="P4">INST <text:s/>IMP ACC ABS 0PG IMM AB,X AB,Y (I,X) (I),Y OPG,X 0PG,Y REL IND |NVBDIZC</text:p>
      <text:p text:style-name="P16">LDX <text:s text:c="11"/>AE <text:s/>A6 <text:s/>A2 <text:s text:c="6"/>BE <text:s text:c="20"/>B6 <text:s text:c="10"/>|X <text:s text:c="3"/>X </text:p>
      <text:p text:style-name="P16">LDY <text:s text:c="11"/>AC <text:s/>A4 <text:s/>A0 <text:s/>BC <text:s text:c="19"/>B4 <text:s text:c="16"/>|X <text:s text:c="3"/>X </text:p>
      <text:p text:style-name="P16">LSR <text:s text:c="7"/>4A <text:s/>4E <text:s/>46 <text:s text:c="5"/>5E <text:s text:c="19"/>56 <text:s text:c="16"/>|0 <text:s text:c="3"/>XX</text:p>
      <text:p text:style-name="P16">NOP <text:s text:c="3"/>EA <text:s text:c="58"/>| <text:s text:c="6"/></text:p>
      <text:p text:style-name="P16">ORA <text:s text:c="11"/>0D <text:s/>05 <text:s/>09 <text:s/>1D <text:s text:c="2"/>19 <text:s text:c="2"/>01 <text:s text:c="3"/>11 <text:s text:c="3"/>15 <text:s text:c="16"/>|X <text:s text:c="3"/>X </text:p>
      <text:p text:style-name="P16">PHA <text:s text:c="3"/>48 <text:s text:c="58"/>| <text:s text:c="6"/></text:p>
      <text:p text:style-name="P16">PHP <text:s text:c="3"/>08 <text:s text:c="58"/>| <text:s text:c="6"/></text:p>
      <text:p text:style-name="P16">PLA <text:s text:c="3"/>68 <text:s text:c="58"/>|X <text:s text:c="3"/>X </text:p>
      <text:p text:style-name="P16">PLP <text:s text:c="3"/>28 <text:s text:c="58"/>|XXXXXXX</text:p>
      <text:p text:style-name="P16">ROL <text:s text:c="7"/>2A <text:s/>2E <text:s/>26 <text:s text:c="5"/>3E <text:s text:c="19"/>36 <text:s text:c="16"/>|X <text:s text:c="3"/>XX</text:p>
      <text:p text:style-name="P4">INST <text:s/>IMP ACC ABS 0PG IMM AB,X AB,Y (I,X) (I),Y OPG,X 0PG,Y REL IND |NVBDIZC</text:p>
      <text:p text:style-name="P16">ROR <text:s text:c="7"/><text:span text:style-name="T3">6A <text:s/>6E <text:s/>66 <text:s text:c="5"/>7E <text:s text:c="19"/>76 <text:s text:c="16"/>|X <text:s text:c="3"/>XX</text:span></text:p>
      <text:p text:style-name="P18">RTI <text:s text:c="3"/>40 <text:s text:c="58"/>|XXXXXXX</text:p>
      <text:p text:style-name="P18">RTS <text:s text:c="3"/>60 <text:s text:c="58"/>| <text:s text:c="6"/></text:p>
      <text:p text:style-name="P18">SBC <text:s text:c="11"/>ED <text:s/>E5 <text:s/>E9 <text:s/>FD <text:s text:c="2"/>F9 <text:s text:c="2"/>E1 <text:s text:c="3"/>F1 <text:s text:c="3"/>F5 <text:s text:c="16"/>|XX <text:s text:c="2"/>XX</text:p>
      <text:p text:style-name="P18">SEC <text:s text:c="3"/>38 <text:s text:c="58"/>| <text:s text:c="5"/>1</text:p>
      <text:p text:style-name="P18">SED <text:s text:c="3"/>F8 <text:s text:c="58"/>| <text:s text:c="2"/>1 <text:s text:c="2"/></text:p>
      <text:p text:style-name="P18">SEI <text:s text:c="3"/>78 <text:s text:c="58"/>| <text:s text:c="3"/>1 <text:s/></text:p>
      <text:p text:style-name="P18">STA <text:s text:c="11"/><text:span text:style-name="T4">8D <text:s/>85 <text:s text:c="5"/>9D <text:s text:c="2"/>99 <text:s text:c="2"/>81 <text:s text:c="3"/>91 <text:s text:c="3"/>95 <text:s text:c="16"/>| <text:s text:c="6"/></text:span></text:p>
      <text:p text:style-name="P20">STX <text:s text:c="11"/>8E <text:s/>86 <text:s text:c="33"/>96 <text:s text:c="10"/>| <text:s text:c="6"/></text:p>
      <text:p text:style-name="P20">STY <text:s text:c="11"/>8C <text:s/>84 <text:s text:c="27"/>94 <text:s text:c="16"/>| <text:s text:c="6"/></text:p>
      <text:p text:style-name="P20">TAX <text:s text:c="3"/>AA <text:s text:c="58"/>|X <text:s text:c="3"/>X </text:p>
      <text:p text:style-name="P20">TAY <text:s text:c="3"/>A8 <text:s text:c="58"/>|X <text:s text:c="3"/>X </text:p>
      <text:p text:style-name="P20">TSX <text:s text:c="3"/>BA <text:s text:c="58"/>|X <text:s text:c="3"/>X </text:p>
      <text:p text:style-name="P20">TXA <text:s text:c="3"/>8A <text:s text:c="58"/>|X <text:s text:c="3"/>X </text:p>
      <text:p text:style-name="P20">TXS <text:s text:c="3"/>9a <text:s text:c="58"/>| <text:s text:c="6"/></text:p>
      <text:p text:style-name="P20">TYA <text:s text:c="3"/>98 <text:s text:c="58"/>|X <text:s text:c="3"/>X </text:p>
      <text:p text:style-name="P20"/>
      <text:p text:style-name="P20"/>
      <text:p text:style-name="P20"/>
      <text:p text:style-name="P20"/>
      <text:p text:style-name="P23"><text:soft-page-break/></text:p>
      <text:p text:style-name="P5">INST <text:span text:style-name="T3">|</text:span>IMP<text:span text:style-name="T3">|</text:span>ACC<text:span text:style-name="T3">|</text:span>ABS<text:span text:style-name="T3">|</text:span>0PG<text:span text:style-name="T3">|</text:span>IMM<text:span text:style-name="T3">|</text:span>AB,X<text:span text:style-name="T3">|</text:span>AB,Y<text:span text:style-name="T3">|</text:span>(I,X)<text:span text:style-name="T5">|</text:span>(I),Y<text:span text:style-name="T5">|</text:span>OPG,X<text:span text:style-name="T5">|</text:span>0PG,Y<text:span text:style-name="T5">|</text:span>REL<text:span text:style-name="T5">|</text:span>IND |NVBDIZC</text:p>
      <text:p text:style-name="P5">ADC <text:s/><text:span text:style-name="T5">|</text:span> <text:s text:c="2"/><text:span text:style-name="T5">|</text:span> <text:s text:c="2"/><text:span text:style-name="T5">|</text:span> 6D<text:span text:style-name="T5">|</text:span> 65<text:span text:style-name="T5">|</text:span> 69<text:span text:style-name="T5">|</text:span> 7D <text:span text:style-name="T5">|</text:span> 79 <text:span text:style-name="T5">|</text:span> <text:s/>61 <text:span text:style-name="T5">|</text:span> 71 <text:s/><text:span text:style-name="T5">|</text:span> 75 <text:s/><text:span text:style-name="T5">|</text:span> <text:s text:c="4"/><text:span text:style-name="T5">|</text:span> <text:s text:c="2"/><text:span text:style-name="T5">|</text:span> <text:s text:c="3"/>|XX <text:s text:c="2"/>XX</text:p>
      <text:p text:style-name="P5">AND <text:s/><text:span text:style-name="T5">|</text:span> <text:s text:c="2"/><text:span text:style-name="T5">|</text:span> <text:s text:c="2"/><text:span text:style-name="T5">|</text:span> 2D<text:span text:style-name="T5">|</text:span> 25<text:span text:style-name="T5">|</text:span> 29<text:span text:style-name="T5">|</text:span> 3D <text:span text:style-name="T5">|</text:span> 39 <text:span text:style-name="T5">|</text:span> <text:s/>21 <text:span text:style-name="T5">|</text:span> 31 <text:s/><text:span text:style-name="T5">|</text:span> 35 <text:s/><text:span text:style-name="T5">|</text:span> <text:s text:c="4"/><text:span text:style-name="T5">|</text:span> <text:s text:c="2"/><text:span text:style-name="T5">|</text:span> <text:s text:c="3"/>|X <text:s text:c="3"/>X </text:p>
      <text:p text:style-name="P5">ASL <text:s/><text:span text:style-name="T5">|</text:span> <text:s text:c="2"/><text:span text:style-name="T5">|</text:span> 0A<text:span text:style-name="T5">|</text:span> 0E<text:span text:style-name="T5">|</text:span> 06<text:span text:style-name="T5">|</text:span> <text:s text:c="2"/><text:span text:style-name="T5">|</text:span> 1E <text:span text:style-name="T5">|</text:span> <text:s text:c="3"/><text:span text:style-name="T5">|</text:span> <text:s text:c="4"/><text:span text:style-name="T5">|</text:span> <text:s text:c="4"/><text:span text:style-name="T5">|</text:span> 16 <text:s/><text:span text:style-name="T5">|</text:span> <text:s text:c="4"/><text:span text:style-name="T5">|</text:span> <text:s text:c="2"/><text:span text:style-name="T5">|</text:span> <text:s text:c="3"/>|X <text:s text:c="3"/>XX</text:p>
      <text:p text:style-name="P5"><text:span text:style-name="T1">BCC <text:s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3"/></text:span><text:span text:style-name="T5">|</text:span><text:span text:style-name="T1"> <text:s text:c="3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90</text:span><text:span text:style-name="T5">|</text:span><text:span text:style-name="T1"> <text:s text:c="3"/>|</text:span></text:p>
      <text:p text:style-name="P5"><text:span text:style-name="T1">BCS <text:s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3"/></text:span><text:span text:style-name="T5">|</text:span><text:span text:style-name="T1"> <text:s text:c="3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B0</text:span><text:span text:style-name="T5">|</text:span><text:span text:style-name="T1"> <text:s text:c="3"/>|</text:span></text:p>
      <text:p text:style-name="P5"><text:span text:style-name="T1">BEQ <text:s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<text:s text:c="3"/></text:span><text:span text:style-name="T5">|</text:span><text:span text:style-name="T1"> <text:s text:c="3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F0</text:span><text:span text:style-name="T5">|</text:span><text:span text:style-name="T1"> <text:s text:c="3"/>|</text:span></text:p>
      <text:p text:style-name="P5"><text:span text:style-name="T1">BIT <text:s/></text:span><text:span text:style-name="T5">|</text:span><text:span text:style-name="T1"> <text:s text:c="2"/></text:span><text:span text:style-name="T5">|</text:span><text:span text:style-name="T1"> <text:s text:c="2"/></text:span><text:span text:style-name="T5">|</text:span><text:span text:style-name="T1"> 2C</text:span><text:span text:style-name="T5">|</text:span><text:span text:style-name="T1"> 24</text:span><text:span text:style-name="T5">|</text:span><text:span text:style-name="T1"> <text:s text:c="2"/></text:span><text:span text:style-name="T5">|</text:span><text:span text:style-name="T1"> <text:s text:c="3"/></text:span><text:span text:style-name="T5">|</text:span><text:span text:style-name="T1"> <text:s text:c="3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4"/></text:span><text:span text:style-name="T5">|</text:span><text:span text:style-name="T1"> <text:s text:c="2"/></text:span><text:span text:style-name="T5">|</text:span><text:span text:style-name="T1"> <text:s text:c="3"/>|76 <text:s text:c="2"/>X </text:span></text:p>
      <text:p text:style-name="P5"><text:span text:style-name="T1">BMI <text:s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3"/></text:span><text:span text:style-name="T6">|</text:span><text:span text:style-name="T1"> <text:s text:c="3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30</text:span><text:span text:style-name="T6">|</text:span><text:span text:style-name="T1"> <text:s text:c="3"/>|</text:span></text:p>
      <text:p text:style-name="P5"><text:span text:style-name="T1">BNE <text:s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3"/></text:span><text:span text:style-name="T6">|</text:span><text:span text:style-name="T1"> <text:s text:c="3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D0</text:span><text:span text:style-name="T6">|</text:span><text:span text:style-name="T1"> <text:s text:c="3"/>| <text:s text:c="6"/></text:span></text:p>
      <text:p text:style-name="P5"><text:span text:style-name="T1">BPL <text:s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2"/></text:span><text:span text:style-name="T6">|</text:span><text:span text:style-name="T1"> <text:s text:c="3"/></text:span><text:span text:style-name="T6">|</text:span><text:span text:style-name="T1"> <text:s text:c="3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<text:s text:c="4"/></text:span><text:span text:style-name="T6">|</text:span><text:span text:style-name="T1"> 10</text:span><text:span text:style-name="T6">|</text:span> <text:s text:c="3"/><text:span text:style-name="T1">|</text:span></text:p>
      <text:p text:style-name="P6">INST <text:span text:style-name="T3">|</text:span>IMP<text:span text:style-name="T3">|</text:span>ACC<text:span text:style-name="T3">|</text:span>ABS<text:span text:style-name="T3">|</text:span>0PG<text:span text:style-name="T3">|</text:span>IMM<text:span text:style-name="T3">|</text:span>AB,X<text:span text:style-name="T3">|</text:span>AB,Y<text:span text:style-name="T3">|</text:span>(I,X)<text:span text:style-name="T5">|</text:span>(I),Y<text:span text:style-name="T5">|</text:span>OPG,X<text:span text:style-name="T5">|</text:span>0PG,Y<text:span text:style-name="T5">|</text:span>REL<text:span text:style-name="T5">|</text:span>IND |NVBDIZC</text:p>
      <text:p text:style-name="P5"><text:span text:style-name="T1">BRK <text:s/></text:span><text:span text:style-name="T7">|</text:span><text:span text:style-name="T1"> 00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3"/></text:span><text:span text:style-name="T7">|</text:span><text:span text:style-name="T1"> <text:s text:c="3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2"/></text:span><text:span text:style-name="T7">|</text:span><text:span text:style-name="T1"> <text:s text:c="3"/>| <text:s/>1 <text:s text:c="3"/></text:span></text:p>
      <text:p text:style-name="P5"><text:span text:style-name="T1">BVC <text:s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3"/></text:span><text:span text:style-name="T7">|</text:span><text:span text:style-name="T1"> <text:s text:c="3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50</text:span><text:span text:style-name="T7">|</text:span><text:span text:style-name="T1"> <text:s text:c="3"/>| <text:s text:c="6"/></text:span></text:p>
      <text:p text:style-name="P5"><text:span text:style-name="T1">BVS <text:s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2"/></text:span><text:span text:style-name="T7">|</text:span><text:span text:style-name="T1"> <text:s text:c="3"/></text:span><text:span text:style-name="T7">|</text:span><text:span text:style-name="T1"> <text:s text:c="3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<text:s text:c="4"/></text:span><text:span text:style-name="T7">|</text:span><text:span text:style-name="T1"> 70</text:span><text:span text:style-name="T7">|</text:span> <text:s text:c="3"/><text:span text:style-name="T1">| <text:s text:c="6"/></text:span></text:p>
      <text:p text:style-name="P11">CLC <text:s/><text:span text:style-name="T7">|</text:span> 18<text:span text:style-name="T7">|</text:span> <text:s text:c="2"/><text:span text:style-name="T7">|</text:span> <text:s text:c="2"/><text:span text:style-name="T7">|</text:span> <text:s text:c="2"/><text:span text:style-name="T7">|</text:span> <text:s text:c="2"/><text:span text:style-name="T7">|</text:span> <text:s text:c="3"/><text:span text:style-name="T7">|</text:span> <text:s text:c="3"/><text:span text:style-name="T7">|</text:span> <text:s text:c="4"/><text:span text:style-name="T7">|</text:span> <text:s text:c="4"/><text:span text:style-name="T7">|</text:span> <text:s text:c="4"/><text:span text:style-name="T7">|</text:span> <text:s text:c="4"/><text:span text:style-name="T7">|</text:span> <text:s text:c="2"/><text:span text:style-name="T7">|</text:span> <text:s text:c="3"/>| <text:s text:c="5"/>0</text:p>
      <text:p text:style-name="P11">CLD <text:s/><text:span text:style-name="T7">|</text:span> D8<text:span text:style-name="T7">|</text:span> <text:s text:c="2"/><text:span text:style-name="T7">|</text:span> <text:s text:c="2"/><text:span text:style-name="T7">|</text:span> <text:s text:c="2"/><text:span text:style-name="T7">|</text:span> <text:s text:c="2"/><text:span text:style-name="T7">|</text:span> <text:s text:c="3"/><text:span text:style-name="T7">|</text:span> <text:s text:c="3"/><text:span text:style-name="T7">|</text:span> <text:s text:c="4"/><text:span text:style-name="T7">|</text:span> <text:s text:c="4"/><text:span text:style-name="T7">|</text:span> <text:s text:c="4"/><text:span text:style-name="T7">|</text:span> <text:s text:c="4"/><text:span text:style-name="T7">|</text:span> <text:s text:c="2"/><text:span text:style-name="T7">|</text:span> <text:s text:c="3"/>| <text:s text:c="2"/>0 <text:s text:c="2"/></text:p>
      <text:p text:style-name="P11">CLI <text:s/><text:span text:style-name="T7">|</text:span> 58<text:span text:style-name="T7">|</text:span> <text:s text:c="2"/><text:span text:style-name="T7">|</text:span> <text:s text:c="2"/><text:span text:style-name="T7">|</text:span> <text:s text:c="2"/><text:span text:style-name="T7">|</text:span> <text:s text:c="2"/><text:span text:style-name="T7">|</text:span> <text:s text:c="3"/><text:span text:style-name="T7">|</text:span> <text:s text:c="3"/><text:span text:style-name="T7">|</text:span> <text:s text:c="4"/><text:span text:style-name="T7">|</text:span> <text:s text:c="4"/><text:span text:style-name="T7">|</text:span> <text:s text:c="4"/><text:span text:style-name="T7">|</text:span> <text:s text:c="4"/><text:span text:style-name="T7">|</text:span> <text:s text:c="2"/><text:span text:style-name="T7">|</text:span> <text:s text:c="3"/>| <text:s text:c="3"/>0 <text:s/></text:p>
      <text:p text:style-name="P11">CLV <text:s/><text:span text:style-name="T8">|</text:span> B8<text:span text:style-name="T8">|</text:span> <text:s text:c="2"/><text:span text:style-name="T8">|</text:span> <text:s text:c="2"/><text:span text:style-name="T8">|</text:span> <text:s text:c="2"/><text:span text:style-name="T8">|</text:span> <text:s text:c="2"/><text:span text:style-name="T8">|</text:span> <text:s text:c="3"/><text:span text:style-name="T8">|</text:span> <text:s text:c="3"/><text:span text:style-name="T8">|</text:span> <text:s text:c="4"/><text:span text:style-name="T8">|</text:span> <text:s text:c="4"/><text:span text:style-name="T8">|</text:span> <text:s text:c="4"/><text:span text:style-name="T8">|</text:span> <text:s text:c="4"/><text:span text:style-name="T8">|</text:span> <text:s text:c="2"/><text:span text:style-name="T8">|</text:span> <text:s text:c="3"/>| 0 <text:s text:c="4"/></text:p>
      <text:p text:style-name="P11">CMP <text:s/><text:span text:style-name="T8">|</text:span> <text:s text:c="2"/><text:span text:style-name="T8">|</text:span> <text:s text:c="2"/><text:span text:style-name="T8">|</text:span> CD<text:span text:style-name="T8">|</text:span> C5<text:span text:style-name="T8">|</text:span> C9<text:span text:style-name="T8">|</text:span> DD <text:span text:style-name="T8">|</text:span> D9 <text:span text:style-name="T8">|</text:span> <text:s/>C1 <text:span text:style-name="T8">|</text:span> <text:s/>D1 <text:span text:style-name="T8">|</text:span> D5 <text:s/><text:span text:style-name="T8">|</text:span> <text:s text:c="4"/><text:span text:style-name="T8">|</text:span> <text:s text:c="2"/><text:span text:style-name="T8">|</text:span> <text:s text:c="3"/>|X <text:s text:c="3"/>XX</text:p>
      <text:p text:style-name="P13">CPX <text:s/><text:span text:style-name="T9">|</text:span> <text:s text:c="2"/><text:span text:style-name="T9">|</text:span> <text:s text:c="2"/><text:span text:style-name="T9">|</text:span> EC<text:span text:style-name="T9">|</text:span> E4<text:span text:style-name="T9">|</text:span> E0<text:span text:style-name="T9">|</text:span> <text:s text:c="3"/><text:span text:style-name="T9">|</text:span> <text:s text:c="3"/><text:span text:style-name="T9">|</text:span> <text:s text:c="4"/><text:span text:style-name="T9">|</text:span> <text:s text:c="4"/><text:span text:style-name="T9">|</text:span> <text:s text:c="4"/><text:span text:style-name="T9">|</text:span> <text:s text:c="4"/><text:span text:style-name="T9">|</text:span> <text:s text:c="2"/><text:span text:style-name="T9">|</text:span> <text:s text:c="3"/>|X <text:s text:c="3"/>XX</text:p>
      <text:p text:style-name="P13">CPY <text:s/><text:span text:style-name="T9">|</text:span> <text:s text:c="2"/><text:span text:style-name="T9">|</text:span> <text:s text:c="2"/><text:span text:style-name="T9">|</text:span> CC<text:span text:style-name="T9">|</text:span> C4<text:span text:style-name="T9">|</text:span> C0<text:span text:style-name="T9">|</text:span> <text:s text:c="3"/><text:span text:style-name="T10">|</text:span> <text:s text:c="3"/><text:span text:style-name="T10">|</text:span> <text:s text:c="4"/><text:span text:style-name="T10">|</text:span> <text:s text:c="4"/><text:span text:style-name="T10">|</text:span> <text:s text:c="4"/><text:span text:style-name="T10">|</text:span> <text:s text:c="4"/><text:span text:style-name="T10">|</text:span> <text:s text:c="2"/><text:span text:style-name="T10">|</text:span> <text:s text:c="3"/>|X <text:s text:c="3"/>XX</text:p>
      <text:p text:style-name="P7">INST <text:span text:style-name="T3">|</text:span>IMP<text:span text:style-name="T3">|</text:span>ACC<text:span text:style-name="T3">|</text:span>ABS<text:span text:style-name="T3">|</text:span>0PG<text:span text:style-name="T3">|</text:span>IMM<text:span text:style-name="T3">|</text:span>AB,X<text:span text:style-name="T3">|</text:span>AB,Y<text:span text:style-name="T3">|</text:span>(I,X)<text:span text:style-name="T5">|</text:span>(I),Y<text:span text:style-name="T5">|</text:span>OPG,X<text:span text:style-name="T5">|</text:span>0PG,Y<text:span text:style-name="T5">|</text:span>REL<text:span text:style-name="T5">|</text:span>IND |NVBDIZC</text:p>
      <text:p text:style-name="P15">DEC <text:s/><text:span text:style-name="T10">|</text:span> <text:s text:c="2"/><text:span text:style-name="T10">|</text:span> <text:s text:c="2"/><text:span text:style-name="T10">|</text:span> CE<text:span text:style-name="T10">|</text:span> <text:span text:style-name="T2">C6</text:span><text:span text:style-name="T10">|</text:span><text:span text:style-name="T2"> <text:s text:c="2"/></text:span><text:span text:style-name="T10">|</text:span><text:span text:style-name="T2"> DE </text:span><text:span text:style-name="T10">|</text:span><text:span text:style-name="T2"> <text:s text:c="3"/></text:span><text:span text:style-name="T10">|</text:span><text:span text:style-name="T2"> <text:s text:c="4"/></text:span><text:span text:style-name="T10">|</text:span><text:span text:style-name="T2"> <text:s text:c="4"/></text:span><text:span text:style-name="T10">|</text:span><text:span text:style-name="T2"> D6 <text:s/></text:span><text:span text:style-name="T10">|</text:span><text:span text:style-name="T2"> <text:s text:c="4"/></text:span><text:span text:style-name="T10">|</text:span><text:span text:style-name="T2"> <text:s text:c="2"/></text:span><text:span text:style-name="T10">|</text:span><text:span text:style-name="T2"> <text:s text:c="3"/>|X <text:s text:c="3"/>X </text:span></text:p>
      <text:p text:style-name="P17">DEX <text:s/><text:span text:style-name="T10">|</text:span> CA<text:span text:style-name="T10">|</text:span> <text:s text:c="2"/><text:span text:style-name="T10">|</text:span> <text:s text:c="2"/><text:span text:style-name="T10">|</text:span> <text:s text:c="2"/><text:span text:style-name="T10">|</text:span> <text:s text:c="2"/><text:span text:style-name="T10">|</text:span> <text:s text:c="3"/><text:span text:style-name="T10">|</text:span> <text:s text:c="3"/><text:span text:style-name="T10">|</text:span> <text:s text:c="4"/><text:span text:style-name="T10">|</text:span> <text:s text:c="4"/><text:span text:style-name="T10">|</text:span> <text:s text:c="4"/><text:span text:style-name="T10">|</text:span> <text:s text:c="4"/><text:span text:style-name="T10">|</text:span> <text:s text:c="2"/><text:span text:style-name="T10">|</text:span> <text:s text:c="3"/>|X <text:s text:c="3"/>X </text:p>
      <text:p text:style-name="P17">DEY <text:s/><text:span text:style-name="T10">|</text:span> 88<text:span text:style-name="T10">|</text:span> <text:s text:c="2"/><text:span text:style-name="T10">|</text:span> <text:s text:c="2"/><text:span text:style-name="T10">|</text:span> <text:s text:c="2"/><text:span text:style-name="T10">|</text:span> <text:s text:c="2"/><text:span text:style-name="T10">|</text:span> <text:s text:c="3"/><text:span text:style-name="T10">|</text:span> <text:s text:c="3"/><text:span text:style-name="T10">|</text:span> <text:s text:c="4"/><text:span text:style-name="T10">|</text:span> <text:s text:c="4"/><text:span text:style-name="T10">|</text:span> <text:s text:c="4"/><text:span text:style-name="T10">|</text:span> <text:s text:c="4"/><text:span text:style-name="T10">|</text:span> <text:s text:c="2"/><text:span text:style-name="T10">|</text:span> <text:s text:c="3"/>|X <text:s text:c="3"/>X </text:p>
      <text:p text:style-name="P17">EOR <text:s/><text:span text:style-name="T10">|</text:span> <text:s text:c="2"/><text:span text:style-name="T10">|</text:span> <text:s text:c="2"/><text:span text:style-name="T10">|</text:span> 4D<text:span text:style-name="T10">|</text:span> 45<text:span text:style-name="T10">|</text:span> 49<text:span text:style-name="T10">|</text:span> 5D <text:span text:style-name="T10">|</text:span> 59 <text:span text:style-name="T10">|</text:span> 41 <text:s/><text:span text:style-name="T10">|</text:span> 51 <text:s/><text:span text:style-name="T10">|</text:span> 55 <text:s/><text:span text:style-name="T10">|</text:span> <text:s text:c="4"/><text:span text:style-name="T10">|</text:span> <text:s text:c="2"/><text:span text:style-name="T10">|</text:span> <text:s text:c="3"/>|X <text:s text:c="3"/>X </text:p>
      <text:p text:style-name="P17">INC <text:s/><text:span text:style-name="T10">|</text:span> <text:s text:c="2"/><text:span text:style-name="T10">|</text:span> <text:s text:c="2"/><text:span text:style-name="T10">|</text:span> EE<text:span text:style-name="T10">|</text:span> E6<text:span text:style-name="T10">|</text:span> <text:s text:c="2"/><text:span text:style-name="T10">|</text:span> FE <text:span text:style-name="T10">|</text:span> <text:s text:c="3"/><text:span text:style-name="T10">|</text:span> <text:s text:c="4"/><text:span text:style-name="T10">|</text:span> <text:s text:c="4"/><text:span text:style-name="T10">|</text:span> F6 <text:s/><text:span text:style-name="T10">|</text:span> <text:s text:c="4"/><text:span text:style-name="T10">|</text:span> <text:s text:c="2"/><text:span text:style-name="T10">|</text:span> <text:s text:c="3"/>|X <text:s text:c="3"/>X </text:p>
      <text:p text:style-name="P17">INX <text:s/><text:span text:style-name="T11">|</text:span> E8<text:span text:style-name="T11">|</text:span> <text:s text:c="2"/><text:span text:style-name="T11">|</text:span> <text:s text:c="2"/><text:span text:style-name="T11">|</text:span> <text:s text:c="2"/><text:span text:style-name="T11">|</text:span> <text:s text:c="2"/><text:span text:style-name="T11">|</text:span> <text:s text:c="3"/><text:span text:style-name="T11">|</text:span> <text:s text:c="3"/><text:span text:style-name="T11">|</text:span> <text:s text:c="4"/><text:span text:style-name="T11">|</text:span> <text:s text:c="4"/><text:span text:style-name="T11">|</text:span> <text:s text:c="4"/><text:span text:style-name="T11">|</text:span> <text:s text:c="4"/><text:span text:style-name="T11">|</text:span> <text:s text:c="2"/><text:span text:style-name="T11">|</text:span> <text:s text:c="3"/>|X <text:s text:c="3"/>X </text:p>
      <text:p text:style-name="P17">INY <text:s/><text:span text:style-name="T11">|</text:span> C8<text:span text:style-name="T11">|</text:span> <text:s text:c="2"/><text:span text:style-name="T11">|</text:span> <text:s text:c="2"/><text:span text:style-name="T11">|</text:span> <text:s text:c="2"/><text:span text:style-name="T11">|</text:span> <text:s text:c="2"/><text:span text:style-name="T11">|</text:span> <text:s text:c="3"/><text:span text:style-name="T11">|</text:span> <text:s text:c="3"/><text:span text:style-name="T11">|</text:span> <text:s text:c="4"/><text:span text:style-name="T11">|</text:span> <text:s text:c="4"/><text:span text:style-name="T11">|</text:span> <text:s text:c="4"/><text:span text:style-name="T11">|</text:span> <text:s text:c="4"/><text:span text:style-name="T11">|</text:span> <text:s text:c="2"/><text:span text:style-name="T11">|</text:span> <text:s text:c="3"/>|X <text:s text:c="3"/>X </text:p>
      <text:p text:style-name="P17">JMP <text:s/><text:span text:style-name="T11">|</text:span> <text:s text:c="2"/><text:span text:style-name="T11">|</text:span> <text:s text:c="2"/><text:span text:style-name="T11">|</text:span> 4C<text:span text:style-name="T11">|</text:span> <text:s text:c="2"/><text:span text:style-name="T11">|</text:span> <text:s text:c="2"/><text:span text:style-name="T11">|</text:span> <text:s text:c="3"/><text:span text:style-name="T11">|</text:span> <text:s text:c="3"/><text:span text:style-name="T11">|</text:span> <text:s text:c="4"/><text:span text:style-name="T11">|</text:span> <text:s text:c="4"/><text:span text:style-name="T11">|</text:span> <text:s text:c="4"/><text:span text:style-name="T11">|</text:span> <text:s text:c="4"/><text:span text:style-name="T11">|</text:span> <text:s text:c="2"/><text:span text:style-name="T11">|</text:span> 6C | <text:s text:c="6"/></text:p>
      <text:p text:style-name="P17">JSR <text:s/><text:span text:style-name="T11">|</text:span> <text:s text:c="2"/><text:span text:style-name="T11">|</text:span> <text:s text:c="2"/><text:span text:style-name="T11">|</text:span> 20<text:span text:style-name="T11">|</text:span> <text:s text:c="2"/><text:span text:style-name="T11">|</text:span> <text:s text:c="2"/><text:span text:style-name="T11">|</text:span> <text:s text:c="3"/><text:span text:style-name="T11">|</text:span> <text:s text:c="3"/><text:span text:style-name="T11">|</text:span> <text:s text:c="4"/><text:span text:style-name="T11">|</text:span> <text:s text:c="4"/><text:span text:style-name="T11">|</text:span> <text:s text:c="4"/><text:span text:style-name="T11">|</text:span> <text:s text:c="4"/><text:span text:style-name="T11">|</text:span> <text:s text:c="2"/><text:span text:style-name="T11">|</text:span> <text:s text:c="3"/>| <text:s text:c="6"/></text:p>
      <text:p text:style-name="P17">LDA <text:s/><text:span text:style-name="T12">|</text:span> <text:s text:c="2"/><text:span text:style-name="T12">|</text:span> <text:s text:c="2"/><text:span text:style-name="T12">|</text:span> AD<text:span text:style-name="T12">|</text:span> A5<text:span text:style-name="T12">|</text:span> A9<text:span text:style-name="T12">|</text:span> BD <text:span text:style-name="T12">|</text:span> B9 <text:span text:style-name="T12">|</text:span> A1 <text:s/><text:span text:style-name="T12">|</text:span> B1 <text:s/><text:span text:style-name="T12">|</text:span> B5 <text:s/><text:span text:style-name="T12">|</text:span> <text:s text:c="4"/><text:span text:style-name="T12">|</text:span> <text:s text:c="2"/><text:span text:style-name="T12">|</text:span> <text:s text:c="3"/>|X <text:s text:c="3"/>X </text:p>
      <text:p text:style-name="P8">INST <text:span text:style-name="T3">|</text:span>IMP<text:span text:style-name="T3">|</text:span>ACC<text:span text:style-name="T3">|</text:span>ABS<text:span text:style-name="T3">|</text:span>0PG<text:span text:style-name="T3">|</text:span>IMM<text:span text:style-name="T3">|</text:span>AB,X<text:span text:style-name="T3">|</text:span>AB,Y<text:span text:style-name="T3">|</text:span>(I,X)<text:span text:style-name="T5">|</text:span>(I),Y<text:span text:style-name="T5">|</text:span>OPG,X<text:span text:style-name="T5">|</text:span>0PG,Y<text:span text:style-name="T5">|</text:span>REL<text:span text:style-name="T5">|</text:span>IND |NVBDIZC</text:p>
      <text:p text:style-name="P17">LDX <text:s/><text:span text:style-name="T12">|</text:span> <text:s text:c="2"/><text:span text:style-name="T12">|</text:span> <text:s text:c="2"/><text:span text:style-name="T12">|</text:span> AE<text:span text:style-name="T12">|</text:span> A6<text:span text:style-name="T12">|</text:span> A2<text:span text:style-name="T12">|</text:span> <text:s text:c="3"/><text:span text:style-name="T12">|</text:span> BE <text:span text:style-name="T12">|</text:span> <text:s text:c="4"/><text:span text:style-name="T12">|</text:span> <text:s text:c="4"/><text:span text:style-name="T12">|</text:span> <text:s text:c="4"/><text:span text:style-name="T12">|</text:span> B6 <text:s/><text:span text:style-name="T12">|</text:span> <text:s text:c="2"/><text:span text:style-name="T12">|</text:span> <text:s text:c="3"/>|X <text:s text:c="3"/>X </text:p>
      <text:p text:style-name="P17">LDY <text:s/><text:span text:style-name="T12">|</text:span> <text:s text:c="2"/><text:span text:style-name="T12">|</text:span> <text:s text:c="2"/><text:span text:style-name="T12">|</text:span> AC<text:span text:style-name="T12">|</text:span> A4<text:span text:style-name="T12">|</text:span> A0<text:span text:style-name="T12">|</text:span> BC <text:span text:style-name="T12">|</text:span> <text:s text:c="3"/><text:span text:style-name="T12">|</text:span> <text:s text:c="4"/><text:span text:style-name="T12">|</text:span> <text:s text:c="4"/><text:span text:style-name="T12">|</text:span> B4 <text:s/><text:span text:style-name="T12">|</text:span> <text:s text:c="4"/><text:span text:style-name="T12">|</text:span> <text:s text:c="2"/><text:span text:style-name="T12">|</text:span> <text:s text:c="3"/>|X <text:s text:c="3"/>X </text:p>
      <text:p text:style-name="P17">LSR <text:s/><text:span text:style-name="T12">|</text:span> <text:s text:c="2"/><text:span text:style-name="T12">|</text:span> 4A<text:span text:style-name="T12">|</text:span> 4E<text:span text:style-name="T12">|</text:span> 46<text:span text:style-name="T12">|</text:span> <text:s text:c="2"/><text:span text:style-name="T12">|</text:span> 5E <text:span text:style-name="T12">|</text:span> <text:s text:c="3"/><text:span text:style-name="T12">|</text:span> <text:s text:c="4"/><text:span text:style-name="T12">|</text:span> <text:s text:c="4"/><text:span text:style-name="T12">|</text:span> 56 <text:s/><text:span text:style-name="T12">|</text:span> <text:s text:c="4"/><text:span text:style-name="T12">|</text:span> <text:s text:c="2"/><text:span text:style-name="T12">|</text:span> <text:s text:c="3"/>|0 <text:s text:c="3"/>XX</text:p>
      <text:p text:style-name="P17">NOP <text:s/><text:span text:style-name="T12">|</text:span> EA<text:span text:style-name="T12">|</text:span> <text:s text:c="2"/><text:span text:style-name="T12">|</text:span> <text:s text:c="2"/><text:span text:style-name="T12">|</text:span> <text:s text:c="2"/><text:span text:style-name="T12">|</text:span> <text:s text:c="2"/><text:span text:style-name="T12">|</text:span> <text:s text:c="3"/><text:span text:style-name="T12">|</text:span> <text:s text:c="3"/><text:span text:style-name="T12">|</text:span> <text:s text:c="4"/><text:span text:style-name="T12">|</text:span> <text:s text:c="4"/><text:span text:style-name="T12">|</text:span> <text:s text:c="4"/><text:span text:style-name="T12">|</text:span> <text:s text:c="4"/><text:span text:style-name="T12">|</text:span> <text:s text:c="2"/><text:span text:style-name="T12">|</text:span> <text:s text:c="3"/>| <text:s text:c="6"/></text:p>
      <text:p text:style-name="P17">ORA <text:s/><text:span text:style-name="T12">|</text:span> <text:s text:c="2"/><text:span text:style-name="T12">|</text:span> <text:s text:c="2"/><text:span text:style-name="T12">|</text:span> 0D<text:span text:style-name="T12">|</text:span> 05<text:span text:style-name="T12">|</text:span> 09<text:span text:style-name="T12">|</text:span> 1D <text:span text:style-name="T12">|</text:span> 19 <text:span text:style-name="T12">|</text:span> 01 <text:s/><text:span text:style-name="T12">|</text:span> 11 <text:s/><text:span text:style-name="T12">|</text:span> 15 <text:s/><text:span text:style-name="T12">|</text:span> <text:s text:c="4"/><text:span text:style-name="T12">|</text:span> <text:s text:c="2"/><text:span text:style-name="T12">|</text:span> <text:s text:c="3"/>|X <text:s text:c="3"/>X </text:p>
      <text:p text:style-name="P17">PHA <text:s/><text:span text:style-name="T13">|</text:span> 48<text:span text:style-name="T13">|</text:span> <text:s text:c="2"/><text:span text:style-name="T13">|</text:span> <text:s text:c="2"/><text:span text:style-name="T13">|</text:span> <text:s text:c="2"/><text:span text:style-name="T13">|</text:span> <text:s text:c="2"/><text:span text:style-name="T13">|</text:span> <text:s text:c="3"/><text:span text:style-name="T13">|</text:span> <text:s text:c="3"/><text:span text:style-name="T13">|</text:span> <text:s text:c="4"/><text:span text:style-name="T13">|</text:span> <text:s text:c="4"/><text:span text:style-name="T13">|</text:span> <text:s text:c="4"/><text:span text:style-name="T13">|</text:span> <text:s text:c="4"/><text:span text:style-name="T13">|</text:span> <text:s text:c="2"/><text:span text:style-name="T13">|</text:span> <text:s text:c="3"/>| <text:s text:c="6"/></text:p>
      <text:p text:style-name="P17">PHP <text:s/><text:span text:style-name="T13">|</text:span> 08<text:span text:style-name="T13">|</text:span> <text:s text:c="2"/><text:span text:style-name="T13">|</text:span> <text:s text:c="2"/><text:span text:style-name="T13">|</text:span> <text:s text:c="2"/><text:span text:style-name="T13">|</text:span> <text:s text:c="2"/><text:span text:style-name="T13">|</text:span> <text:s text:c="3"/><text:span text:style-name="T13">|</text:span> <text:s text:c="3"/><text:span text:style-name="T13">|</text:span> <text:s text:c="4"/><text:span text:style-name="T13">|</text:span> <text:s text:c="4"/><text:span text:style-name="T13">|</text:span> <text:s text:c="4"/><text:span text:style-name="T13">|</text:span> <text:s text:c="4"/><text:span text:style-name="T13">|</text:span> <text:s text:c="2"/><text:span text:style-name="T13">|</text:span> <text:s text:c="3"/>| <text:s text:c="6"/></text:p>
      <text:p text:style-name="P17">PLA <text:s/><text:span text:style-name="T13">|</text:span> 68<text:span text:style-name="T13">|</text:span> <text:s text:c="2"/><text:span text:style-name="T13">|</text:span> <text:s text:c="2"/><text:span text:style-name="T13">|</text:span> <text:s text:c="2"/><text:span text:style-name="T13">|</text:span> <text:s text:c="2"/><text:span text:style-name="T13">|</text:span> <text:s text:c="3"/><text:span text:style-name="T13">|</text:span> <text:s text:c="3"/><text:span text:style-name="T13">|</text:span> <text:s text:c="4"/><text:span text:style-name="T13">|</text:span> <text:s text:c="4"/><text:span text:style-name="T13">|</text:span> <text:s text:c="4"/><text:span text:style-name="T13">|</text:span> <text:s text:c="4"/><text:span text:style-name="T13">|</text:span> <text:s text:c="2"/><text:span text:style-name="T13">|</text:span> <text:s text:c="3"/>|X <text:s text:c="3"/>X </text:p>
      <text:p text:style-name="P17">PLP <text:s/><text:span text:style-name="T13">|</text:span> 28<text:span text:style-name="T13">|</text:span> <text:s text:c="2"/><text:span text:style-name="T13">|</text:span> <text:s text:c="2"/><text:span text:style-name="T13">|</text:span> <text:s text:c="2"/><text:span text:style-name="T13">|</text:span> <text:s text:c="2"/><text:span text:style-name="T13">|</text:span> <text:s text:c="3"/><text:span text:style-name="T13">|</text:span> <text:s text:c="3"/><text:span text:style-name="T13">|</text:span> <text:s text:c="4"/><text:span text:style-name="T13">|</text:span> <text:s text:c="4"/><text:span text:style-name="T13">|</text:span> <text:s text:c="4"/><text:span text:style-name="T13">|</text:span> <text:s text:c="4"/><text:span text:style-name="T13">|</text:span> <text:s text:c="2"/><text:span text:style-name="T13">|</text:span> <text:s text:c="3"/>|XXXXXXX</text:p>
      <text:p text:style-name="P17">ROL <text:s/><text:span text:style-name="T13">|</text:span> <text:s text:c="2"/><text:span text:style-name="T13">|</text:span> 2A<text:span text:style-name="T13">|</text:span> 2E<text:span text:style-name="T13">|</text:span> 26<text:span text:style-name="T13">|</text:span> <text:s text:c="2"/><text:span text:style-name="T13">|</text:span> 3E <text:span text:style-name="T13">|</text:span> <text:s text:c="3"/><text:span text:style-name="T13">|</text:span> <text:s text:c="4"/><text:span text:style-name="T13">|</text:span> <text:s text:c="4"/><text:span text:style-name="T13">|</text:span> 36 <text:s/><text:span text:style-name="T13">|</text:span> <text:s text:c="4"/><text:span text:style-name="T13">|</text:span> <text:s text:c="2"/><text:span text:style-name="T13">|</text:span> <text:s text:c="3"/>|X <text:s text:c="3"/>XX</text:p>
      <text:p text:style-name="P9">INST <text:span text:style-name="T3">|</text:span>IMP<text:span text:style-name="T3">|</text:span>ACC<text:span text:style-name="T3">|</text:span>ABS<text:span text:style-name="T3">|</text:span>0PG<text:span text:style-name="T3">|</text:span>IMM<text:span text:style-name="T3">|</text:span>AB,X<text:span text:style-name="T3">|</text:span>AB,Y<text:span text:style-name="T3">|</text:span>(I,X)<text:span text:style-name="T5">|</text:span>(I),Y<text:span text:style-name="T5">|</text:span>OPG,X<text:span text:style-name="T5">|</text:span>0PG,Y<text:span text:style-name="T5">|</text:span>REL<text:span text:style-name="T5">|</text:span>IND |NVBDIZC</text:p>
      <text:p text:style-name="P17">ROR <text:s/><text:span text:style-name="T14">|</text:span> <text:s text:c="2"/><text:span text:style-name="T14">|</text:span> <text:span text:style-name="T3">6A</text:span><text:span text:style-name="T14">|</text:span><text:span text:style-name="T3"> 6E</text:span><text:span text:style-name="T14">|</text:span><text:span text:style-name="T3"> 66</text:span><text:span text:style-name="T14">|</text:span><text:span text:style-name="T3"> <text:s text:c="2"/></text:span><text:span text:style-name="T14">|</text:span><text:span text:style-name="T3"> 7E </text:span><text:span text:style-name="T14">|</text:span><text:span text:style-name="T3"> <text:s text:c="3"/></text:span><text:span text:style-name="T14">|</text:span><text:span text:style-name="T3"> <text:s text:c="4"/></text:span><text:span text:style-name="T14">|</text:span><text:span text:style-name="T3"> <text:s text:c="4"/></text:span><text:span text:style-name="T14">|</text:span><text:span text:style-name="T3"> 76 <text:s/></text:span><text:span text:style-name="T14">|</text:span><text:span text:style-name="T3"> <text:s text:c="4"/></text:span><text:span text:style-name="T14">|</text:span><text:span text:style-name="T3"> <text:s text:c="2"/></text:span><text:span text:style-name="T14">|</text:span><text:span text:style-name="T3"> <text:s text:c="3"/>|X <text:s text:c="3"/>XX</text:span></text:p>
      <text:p text:style-name="P19">RTI <text:s/><text:span text:style-name="T14">|</text:span> 40<text:span text:style-name="T14">|</text:span> <text:s text:c="2"/><text:span text:style-name="T14">|</text:span> <text:s text:c="2"/><text:span text:style-name="T14">|</text:span> <text:s text:c="2"/><text:span text:style-name="T14">|</text:span> <text:s text:c="2"/><text:span text:style-name="T14">|</text:span> <text:s text:c="3"/><text:span text:style-name="T14">|</text:span> <text:s text:c="3"/><text:span text:style-name="T14">|</text:span> <text:s text:c="4"/><text:span text:style-name="T14">|</text:span> <text:s text:c="4"/><text:span text:style-name="T14">|</text:span> <text:s text:c="4"/><text:span text:style-name="T14">|</text:span> <text:s text:c="4"/><text:span text:style-name="T14">|</text:span> <text:s text:c="2"/><text:span text:style-name="T14">|</text:span> <text:s text:c="3"/>|XXXXXXX</text:p>
      <text:p text:style-name="P19">RTS <text:s/><text:span text:style-name="T14">|</text:span> 60<text:span text:style-name="T14">|</text:span> <text:s text:c="2"/><text:span text:style-name="T14">|</text:span> <text:s text:c="2"/><text:span text:style-name="T14">|</text:span> <text:s text:c="2"/><text:span text:style-name="T14">|</text:span> <text:s text:c="2"/><text:span text:style-name="T14">|</text:span> <text:s text:c="3"/><text:span text:style-name="T14">|</text:span> <text:s text:c="3"/><text:span text:style-name="T14">|</text:span> <text:s text:c="4"/><text:span text:style-name="T14">|</text:span> <text:s text:c="4"/><text:span text:style-name="T14">|</text:span> <text:s text:c="4"/><text:span text:style-name="T14">|</text:span> <text:s text:c="4"/><text:span text:style-name="T14">|</text:span> <text:s text:c="2"/><text:span text:style-name="T14">|</text:span> <text:s text:c="3"/>| <text:s text:c="6"/></text:p>
      <text:p text:style-name="P19">SBC <text:s/><text:span text:style-name="T15">|</text:span> <text:s text:c="2"/><text:span text:style-name="T15">|</text:span> <text:s text:c="2"/><text:span text:style-name="T15">|</text:span> ED<text:span text:style-name="T15">|</text:span> E5<text:span text:style-name="T15">|</text:span> E9<text:span text:style-name="T15">|</text:span> FD <text:span text:style-name="T15">|</text:span> F9 <text:span text:style-name="T15">|</text:span> E1 <text:s/><text:span text:style-name="T15">|</text:span> F1 <text:s/><text:span text:style-name="T15">|</text:span> F5 <text:s/><text:span text:style-name="T15">|</text:span> <text:s text:c="4"/><text:span text:style-name="T15">|</text:span> <text:s text:c="2"/><text:span text:style-name="T15">|</text:span> <text:s text:c="3"/>|XX <text:s text:c="2"/>XX</text:p>
      <text:p text:style-name="P19">SEC <text:s/><text:span text:style-name="T15">|</text:span> 38<text:span text:style-name="T15">|</text:span> <text:s text:c="2"/><text:span text:style-name="T15">|</text:span> <text:s text:c="2"/><text:span text:style-name="T15">|</text:span> <text:s text:c="2"/><text:span text:style-name="T15">|</text:span> <text:s text:c="2"/><text:span text:style-name="T15">|</text:span> <text:s text:c="3"/><text:span text:style-name="T15">|</text:span> <text:s text:c="3"/><text:span text:style-name="T15">|</text:span> <text:s text:c="4"/><text:span text:style-name="T15">|</text:span> <text:s text:c="4"/><text:span text:style-name="T15">|</text:span> <text:s text:c="4"/><text:span text:style-name="T15">|</text:span> <text:s text:c="4"/><text:span text:style-name="T15">|</text:span> <text:s text:c="2"/><text:span text:style-name="T15">|</text:span> <text:s text:c="3"/>| <text:s text:c="5"/>1</text:p>
      <text:p text:style-name="P19">SED <text:s/><text:span text:style-name="T15">|</text:span> F8<text:span text:style-name="T15">|</text:span> <text:s text:c="2"/><text:span text:style-name="T15">|</text:span> <text:s text:c="2"/><text:span text:style-name="T15">|</text:span> <text:s text:c="2"/><text:span text:style-name="T15">|</text:span> <text:s text:c="2"/><text:span text:style-name="T15">|</text:span> <text:s text:c="3"/><text:span text:style-name="T15">|</text:span> <text:s text:c="3"/><text:span text:style-name="T15">|</text:span> <text:s text:c="4"/><text:span text:style-name="T15">|</text:span> <text:s text:c="4"/><text:span text:style-name="T15">|</text:span> <text:s text:c="4"/><text:span text:style-name="T15">|</text:span> <text:s text:c="4"/><text:span text:style-name="T15">|</text:span> <text:s text:c="2"/><text:span text:style-name="T15">|</text:span> <text:s text:c="3"/>| <text:s text:c="2"/>1 <text:s text:c="2"/></text:p>
      <text:p text:style-name="P19">SEI <text:s/><text:span text:style-name="T15">|</text:span> 78<text:span text:style-name="T15">|</text:span> <text:s text:c="2"/><text:span text:style-name="T15">|</text:span> <text:s text:c="2"/><text:span text:style-name="T15">|</text:span> <text:s text:c="2"/><text:span text:style-name="T15">|</text:span> <text:s text:c="2"/><text:span text:style-name="T15">|</text:span> <text:s text:c="3"/><text:span text:style-name="T15">|</text:span> <text:s text:c="3"/><text:span text:style-name="T15">|</text:span> <text:s text:c="4"/><text:span text:style-name="T15">|</text:span> <text:s text:c="4"/><text:span text:style-name="T15">|</text:span> <text:s text:c="4"/><text:span text:style-name="T15">|</text:span> <text:s text:c="4"/><text:span text:style-name="T15">|</text:span> <text:s text:c="2"/><text:span text:style-name="T15">|</text:span> <text:s text:c="3"/>| <text:s text:c="3"/>1 <text:s/></text:p>
      <text:p text:style-name="P19">STA <text:s/><text:span text:style-name="T15">|</text:span> <text:s text:c="2"/><text:span text:style-name="T15">|</text:span> <text:s text:c="2"/><text:span text:style-name="T15">|</text:span> <text:span text:style-name="T4">8D</text:span><text:span text:style-name="T15">|</text:span><text:span text:style-name="T4"> 85</text:span><text:span text:style-name="T15">|</text:span><text:span text:style-name="T4"> <text:s text:c="2"/></text:span><text:span text:style-name="T15">|</text:span><text:span text:style-name="T4"> 9D </text:span><text:span text:style-name="T15">|</text:span><text:span text:style-name="T4"> 99 </text:span><text:span text:style-name="T15">|</text:span><text:span text:style-name="T4"> 81 <text:s/></text:span><text:span text:style-name="T15">|</text:span><text:span text:style-name="T4"> 91 <text:s/></text:span><text:span text:style-name="T15">|</text:span><text:span text:style-name="T4"> 95 <text:s/></text:span><text:span text:style-name="T15">|</text:span><text:span text:style-name="T4"> <text:s text:c="4"/></text:span><text:span text:style-name="T15">|</text:span><text:span text:style-name="T4"> <text:s text:c="2"/></text:span><text:span text:style-name="T15">|</text:span><text:span text:style-name="T4"> <text:s text:c="3"/>| <text:s text:c="6"/></text:span></text:p>
      <text:p text:style-name="P21">STX <text:s/><text:span text:style-name="T16">|</text:span> <text:s text:c="2"/><text:span text:style-name="T16">|</text:span> <text:s text:c="2"/><text:span text:style-name="T16">|</text:span> 8E<text:span text:style-name="T16">|</text:span> 86<text:span text:style-name="T16">|</text:span> <text:s text:c="2"/><text:span text:style-name="T16">|</text:span> <text:s text:c="3"/><text:span text:style-name="T16">|</text:span> <text:s text:c="3"/><text:span text:style-name="T16">|</text:span> <text:s text:c="4"/><text:span text:style-name="T16">|</text:span> <text:s text:c="4"/><text:span text:style-name="T16">|</text:span> <text:s text:c="4"/><text:span text:style-name="T16">|</text:span> 96 <text:s/><text:span text:style-name="T16">|</text:span> <text:s text:c="2"/><text:span text:style-name="T16">|</text:span> <text:s text:c="3"/>| <text:s text:c="6"/></text:p>
      <text:p text:style-name="P21">STY <text:s/><text:span text:style-name="T16">|</text:span> <text:s text:c="2"/><text:span text:style-name="T16">|</text:span> <text:s text:c="2"/><text:span text:style-name="T16">|</text:span> 8C<text:span text:style-name="T16">|</text:span> 84<text:span text:style-name="T16">|</text:span> <text:s text:c="2"/><text:span text:style-name="T16">|</text:span> <text:s text:c="3"/><text:span text:style-name="T16">|</text:span> <text:s text:c="3"/><text:span text:style-name="T16">|</text:span> <text:s text:c="4"/><text:span text:style-name="T16">|</text:span> <text:s text:c="4"/><text:span text:style-name="T16">|</text:span> 94 <text:s/><text:span text:style-name="T16">|</text:span> <text:s text:c="4"/><text:span text:style-name="T16">|</text:span> <text:s text:c="2"/><text:span text:style-name="T16">|</text:span> <text:s text:c="3"/>| <text:s text:c="6"/></text:p>
      <text:p text:style-name="P21">TAX <text:s/><text:span text:style-name="T16">|</text:span> AA<text:span text:style-name="T16">|</text:span> <text:s text:c="2"/><text:span text:style-name="T16">|</text:span> <text:s text:c="2"/><text:span text:style-name="T16">|</text:span> <text:s text:c="2"/><text:span text:style-name="T16">|</text:span> <text:s text:c="2"/><text:span text:style-name="T16">|</text:span> <text:s text:c="3"/><text:span text:style-name="T16">|</text:span> <text:s text:c="3"/><text:span text:style-name="T16">|</text:span> <text:s text:c="4"/><text:span text:style-name="T16">|</text:span> <text:s text:c="4"/><text:span text:style-name="T16">|</text:span> <text:s text:c="4"/><text:span text:style-name="T16">|</text:span> <text:s text:c="4"/><text:span text:style-name="T16">|</text:span> <text:s text:c="2"/><text:span text:style-name="T16">|</text:span> <text:s text:c="3"/>|X <text:s text:c="3"/>X </text:p>
      <text:p text:style-name="P21">TAY <text:s/><text:span text:style-name="T17">|</text:span> A8<text:span text:style-name="T17">|</text:span> <text:s text:c="2"/><text:span text:style-name="T17">|</text:span> <text:s text:c="2"/><text:span text:style-name="T17">|</text:span> <text:s text:c="2"/><text:span text:style-name="T17">|</text:span> <text:s text:c="2"/><text:span text:style-name="T17">|</text:span> <text:s text:c="3"/><text:span text:style-name="T17">|</text:span> <text:s text:c="3"/><text:span text:style-name="T17">|</text:span> <text:s text:c="4"/><text:span text:style-name="T17">|</text:span> <text:s text:c="4"/><text:span text:style-name="T17">|</text:span> <text:s text:c="4"/><text:span text:style-name="T17">|</text:span> <text:s text:c="4"/><text:span text:style-name="T17">|</text:span> <text:s text:c="2"/><text:span text:style-name="T17">|</text:span> <text:s text:c="3"/>|X <text:s text:c="3"/>X </text:p>
      <text:p text:style-name="P21">TSX <text:s/><text:span text:style-name="T17">|</text:span> BA<text:span text:style-name="T17">|</text:span> <text:s text:c="2"/><text:span text:style-name="T17">|</text:span> <text:s text:c="2"/><text:span text:style-name="T17">|</text:span> <text:s text:c="2"/><text:span text:style-name="T17">|</text:span> <text:s text:c="2"/><text:span text:style-name="T17">|</text:span> <text:s text:c="3"/><text:span text:style-name="T17">|</text:span> <text:s text:c="3"/><text:span text:style-name="T17">|</text:span> <text:s text:c="4"/><text:span text:style-name="T17">|</text:span> <text:s text:c="4"/><text:span text:style-name="T17">|</text:span> <text:s text:c="4"/><text:span text:style-name="T17">|</text:span> <text:s text:c="4"/><text:span text:style-name="T17">|</text:span> <text:s text:c="2"/><text:span text:style-name="T17">|</text:span> <text:s text:c="3"/>|X <text:s text:c="3"/>X </text:p>
      <text:p text:style-name="P21">TXA <text:s/><text:span text:style-name="T18">|</text:span> 8A<text:span text:style-name="T18">|</text:span> <text:s text:c="2"/><text:span text:style-name="T18">|</text:span> <text:s text:c="2"/><text:span text:style-name="T18">|</text:span> <text:s text:c="2"/><text:span text:style-name="T18">|</text:span> <text:s text:c="2"/><text:span text:style-name="T18">|</text:span> <text:s text:c="3"/><text:span text:style-name="T18">|</text:span> <text:s text:c="3"/><text:span text:style-name="T18">|</text:span> <text:s text:c="4"/><text:span text:style-name="T18">|</text:span> <text:s text:c="4"/><text:span text:style-name="T18">|</text:span> <text:s text:c="4"/><text:span text:style-name="T18">|</text:span> <text:s text:c="4"/><text:span text:style-name="T18">|</text:span> <text:s text:c="2"/><text:span text:style-name="T18">|</text:span> <text:s text:c="3"/>|X <text:s text:c="3"/>X </text:p>
      <text:p text:style-name="P21">TXS <text:s/><text:span text:style-name="T18">|</text:span> 9a<text:span text:style-name="T18">|</text:span> <text:s text:c="2"/><text:span text:style-name="T18">|</text:span> <text:s text:c="2"/><text:span text:style-name="T18">|</text:span> <text:s text:c="2"/><text:span text:style-name="T18">|</text:span> <text:s text:c="2"/><text:span text:style-name="T18">|</text:span> <text:s text:c="3"/><text:span text:style-name="T18">|</text:span> <text:s text:c="3"/><text:span text:style-name="T18">|</text:span> <text:s text:c="4"/><text:span text:style-name="T18">|</text:span> <text:s text:c="4"/><text:span text:style-name="T18">|</text:span> <text:s text:c="4"/><text:span text:style-name="T18">|</text:span> <text:s text:c="4"/><text:span text:style-name="T18">|</text:span> <text:s text:c="2"/><text:span text:style-name="T18">|</text:span> <text:s text:c="3"/>| <text:s text:c="6"/></text:p>
      <text:p text:style-name="P21">TYA <text:s/><text:span text:style-name="T18">|</text:span> 98<text:span text:style-name="T18">|</text:span> <text:s text:c="2"/><text:span text:style-name="T18">|</text:span> <text:s text:c="2"/><text:span text:style-name="T18">|</text:span> <text:s text:c="2"/><text:span text:style-name="T18">|</text:span> <text:s text:c="2"/><text:span text:style-name="T18">|</text:span> <text:s text:c="3"/><text:span text:style-name="T18">|</text:span> <text:s text:c="3"/><text:span text:style-name="T18">|</text:span> <text:s text:c="4"/><text:span text:style-name="T18">|</text:span> <text:s text:c="4"/><text:span text:style-name="T18">|</text:span> <text:s text:c="4"/><text:span text:style-name="T18">|</text:span> <text:s text:c="4"/><text:span text:style-name="T18">|</text:span> <text:s text:c="2"/><text:span text:style-name="T18">|</text:span> <text:s text:c="3"/>|X <text:s text:c="3"/>X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1:45:16.905168434</meta:creation-date>
    <dc:date>2025-09-15T22:35:27.658327390</dc:date>
    <meta:editing-duration>PT15H8M16S</meta:editing-duration>
    <meta:editing-cycles>21</meta:editing-cycles>
    <meta:generator>LibreOffice/7.4.7.2$Linux_X86_64 LibreOffice_project/40$Build-2</meta:generator>
    <meta:document-statistic meta:table-count="0" meta:image-count="0" meta:object-count="0" meta:page-count="2" meta:paragraph-count="122" meta:word-count="1317" meta:character-count="9202" meta:non-whitespace-character-count="2643"/>
  </office:meta>
</office:document-meta>
</file>